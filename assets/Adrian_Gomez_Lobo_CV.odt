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4.459in"/>
    </style:style>
    <style:style style:name="TableColumn3" style:family="table-column">
      <style:table-column-properties style:column-width="3.6131in"/>
    </style:style>
    <style:style style:name="Table1" style:family="table" style:master-page-name="MP0">
      <style:table-properties style:width="8.0722in" fo:margin-left="0in" table:align="left"/>
    </style:style>
    <style:style style:name="TableRow4" style:family="table-row">
      <style:table-row-properties style:min-row-height="10.518in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TableColumn7" style:family="table-column">
      <style:table-column-properties style:column-width="4.2791in"/>
    </style:style>
    <style:style style:name="Table6" style:family="table">
      <style:table-properties style:width="4.2791in" fo:margin-left="0in" table:align="left"/>
    </style:style>
    <style:style style:name="TableRow8" style:family="table-row">
      <style:table-row-properties style:min-row-height="2.7493in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ableColumn12" style:family="table-column">
      <style:table-column-properties style:column-width="4.1083in"/>
    </style:style>
    <style:style style:name="Table11" style:family="table">
      <style:table-properties style:width="4.1083in" fo:margin-left="0in" table:align="left"/>
    </style:style>
    <style:style style:name="TableRow13" style:family="table-row">
      <style:table-row-properties style:min-row-height="5.7506in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6pt" style:font-size-asian="16pt" style:font-size-complex="16pt"/>
    </style:style>
    <style:style style:name="P16" style:parent-style-name="Normal" style:family="paragraph">
      <style:paragraph-properties fo:margin-bottom="0in" fo:line-height="100%"/>
      <style:text-properties fo:color="#FFFFFF"/>
    </style:style>
    <style:style style:name="P17" style:parent-style-name="Normal" style:family="paragraph">
      <style:paragraph-properties fo:margin-bottom="0in" fo:line-height="100%"/>
    </style:style>
    <style:style style:name="T18" style:parent-style-name="Fuentedepárrafopredeter." style:family="text">
      <style:text-properties fo:color="#FFFFFF"/>
    </style:style>
    <style:style style:name="T19" style:parent-style-name="Hipervínculo" style:family="text">
      <style:text-properties fo:color="#FFFFFF"/>
    </style:style>
    <style:style style:name="P20" style:parent-style-name="Normal" style:family="paragraph">
      <style:paragraph-properties fo:margin-bottom="0in" fo:line-height="100%"/>
      <style:text-properties fo:color="#FFFFFF"/>
    </style:style>
    <style:style style:name="P21" style:parent-style-name="Normal" style:family="paragraph">
      <style:paragraph-properties fo:margin-bottom="0in" fo:line-height="100%"/>
      <style:text-properties fo:color="#FFFFFF"/>
    </style:style>
    <style:style style:name="P22" style:parent-style-name="Normal" style:family="paragraph">
      <style:paragraph-properties fo:margin-bottom="0in" fo:line-height="100%"/>
    </style:style>
    <style:style style:name="T23" style:parent-style-name="Hipervínculo" style:family="text">
      <style:text-properties fo:color="#FFFFFF"/>
    </style:style>
    <style:style style:name="T24" style:parent-style-name="Hipervínculo" style:family="text">
      <style:text-properties fo:color="#FFFFFF"/>
    </style:style>
    <style:style style:name="T25" style:parent-style-name="Hipervínculo" style:family="text">
      <style:text-properties fo:color="#FFFFFF"/>
    </style:style>
    <style:style style:name="T26" style:parent-style-name="Fuentedepárrafopredeter." style:family="text">
      <style:text-properties fo:color="#FFFFFF"/>
    </style:style>
    <style:style style:name="T27" style:parent-style-name="Hipervínculo" style:family="text">
      <style:text-properties fo:color="#FFFFFF"/>
    </style:style>
    <style:style style:name="T28" style:parent-style-name="Fuentedepárrafopredeter." style:family="text">
      <style:text-properties fo:color="#FFFFFF"/>
    </style:style>
    <style:style style:name="P29" style:parent-style-name="Normal" style:family="paragraph">
      <style:paragraph-properties fo:margin-bottom="0in" fo:line-height="100%"/>
    </style:style>
    <style:style style:name="T30" style:parent-style-name="Hipervínculo" style:family="text">
      <style:text-properties fo:color="#FFFFFF"/>
    </style:style>
    <style:style style:name="P31" style:parent-style-name="Normal" style:family="paragraph">
      <style:paragraph-properties fo:margin-bottom="0in" fo:line-height="100%"/>
      <style:text-properties fo:color="#FFFFFF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34" style:parent-style-name="Normal" style:family="paragraph">
      <style:paragraph-properties fo:margin-bottom="0in" fo:line-height="100%"/>
      <style:text-properties fo:color="#FFFFFF"/>
    </style:style>
    <style:style style:name="P35" style:parent-style-name="Normal" style:family="paragraph">
      <style:paragraph-properties fo:margin-bottom="0in" fo:line-height="100%"/>
      <style:text-properties fo:color="#FFFFFF"/>
    </style:style>
    <style:style style:name="P36" style:parent-style-name="Normal" style:family="paragraph">
      <style:paragraph-properties fo:margin-bottom="0in" fo:line-height="100%"/>
    </style:style>
    <style:style style:name="T37" style:parent-style-name="Fuentedepárrafopredeter." style:family="text">
      <style:text-properties fo:color="#FFFFFF"/>
    </style:style>
    <style:style style:name="T38" style:parent-style-name="Fuentedepárrafopredeter." style:family="text">
      <style:text-properties fo:color="#FFFFFF"/>
    </style:style>
    <style:style style:name="T39" style:parent-style-name="Fuentedepárrafopredeter." style:family="text">
      <style:text-properties fo:color="#FFFFFF"/>
    </style:style>
    <style:style style:name="P40" style:parent-style-name="Normal" style:family="paragraph">
      <style:paragraph-properties fo:margin-bottom="0in" fo:line-height="100%"/>
      <style:text-properties fo:color="#FFFFFF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42" style:parent-style-name="Normal" style:family="paragraph">
      <style:paragraph-properties fo:margin-bottom="0in" fo:line-height="100%"/>
      <style:text-properties fo:color="#FFFFFF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44" style:parent-style-name="Normal" style:family="paragraph">
      <style:paragraph-properties fo:margin-bottom="0in" fo:line-height="100%"/>
    </style:style>
    <style:style style:name="T45" style:parent-style-name="Fuentedepárrafopredeter." style:family="text">
      <style:text-properties fo:font-weight="bold" style:font-weight-asian="bold" style:font-weight-complex="bold" fo:color="#FFFFFF"/>
    </style:style>
    <style:style style:name="T46" style:parent-style-name="Fuentedepárrafopredeter." style:family="text">
      <style:text-properties fo:color="#FFFFFF"/>
    </style:style>
    <style:style style:name="T47" style:parent-style-name="Fuentedepárrafopredeter." style:family="text">
      <style:text-properties fo:color="#FFFFFF"/>
    </style:style>
    <style:style style:name="T48" style:parent-style-name="Fuentedepárrafopredeter." style:family="text">
      <style:text-properties fo:color="#FFFFFF"/>
    </style:style>
    <style:style style:name="T49" style:parent-style-name="Fuentedepárrafopredeter." style:family="text">
      <style:text-properties fo:color="#FFFFFF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61" style:parent-style-name="Normal" style:family="paragraph">
      <style:paragraph-properties fo:margin-bottom="0in" fo:line-height="100%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Normal" style:family="paragraph">
      <style:paragraph-properties fo:margin-bottom="0in" fo:line-height="100%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Normal" style:family="paragraph">
      <style:paragraph-properties fo:margin-bottom="0in" fo:line-height="100%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4167in solid #000000" fo:background-color="transparent" style:wrap="parallel" style:wrap-contour="false" fo:clip="rect(0in, 0in, 0in, 0in)" style:horizontal-rel="page-content" style:vertical-rel="page-content" style:shadow="0.02946in 0.02946in 0pc #000000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able:table table:style-name="Table6">
              <table:table-columns>
                <table:table-column table:style-name="TableColumn7"/>
              </table:table-columns>
              <table:table-row table:style-name="TableRow8">
                <table:table-cell table:style-name="TableCell9">
                  <text:p text:style-name="P10"><draw:frame draw:z-index="251667456" draw:style-name="a0" draw:name="Imagen 3" text:anchor-type="paragraph" svg:x="-0.01528in" svg:y="-0.15694in" svg:width="4.29704in" svg:height="11.84688in" style:rel-width="scale" style:rel-height="scale"><draw:image xlink:href="media/image1.png" xlink:type="simple" xlink:show="embed" xlink:actuate="onLoad"/><svg:title/><svg:desc/></draw:frame><draw:frame draw:z-index="251668480" draw:style-name="a1" draw:name="Imagen 1" text:anchor-type="paragraph" svg:x="0.15069in" svg:y="0.20139in" svg:width="1.53542in" svg:height="2.3125in" style:rel-width="scale" style:rel-height="scale"><draw:image xlink:href="media/image2.jpeg" xlink:type="simple" xlink:show="embed" xlink:actuate="onLoad"/><svg:title/><svg:desc/></draw:frame></text:p>
                </table:table-cell>
              </table:table-row>
            </table:table>
            <text:p text:style-name="Normal"/>
            <table:table table:style-name="Table11">
              <table:table-columns>
                <table:table-column table:style-name="TableColumn12"/>
              </table:table-columns>
              <table:table-row table:style-name="TableRow13">
                <table:table-cell table:style-name="TableCell14">
                  <text:p text:style-name="P15">Adrián Gómez-Lobo Núñez</text:p>
                  <text:p text:style-name="P16"><text:line-break/>Madrid, España<text:line-break/>Teléfono: 678 91 38 90</text:p>
                  <text:p text:style-name="P17"><text:span text:style-name="T18"><text:line-break/>Correo electrónico:<text:s/></text:span><text:a xlink:href="mailto:adrian.gomezlobo@gmail.com" office:target-frame-name="_top" xlink:show="replace"><text:span text:style-name="T19">adrian.gomezlobo@gmail.com</text:span></text:a></text:p>
                  <text:p text:style-name="P20">Otros enlaces:</text:p>
                  <text:p text:style-name="P21"/>
                  <text:p text:style-name="P22"><text:a xlink:href="https://adrianurjc.github.io/" office:target-frame-name="_top" xlink:show="replace"><text:span text:style-name="T23">GitHub Pa</text:span><text:bookmark-start text:name="_Hlt233117050"/><text:bookmark-start text:name="_Hlt233117051"/><text:span text:style-name="T24">g</text:span><text:bookmark-end text:name="_Hlt233117050"/><text:bookmark-end text:name="_Hlt233117051"/><text:span text:style-name="T25">es</text:span></text:a><text:span text:style-name="T26"><text:line-break/></text:span><text:a xlink:href="https://www.linkedin.com/in/adri%C3%A1n-gomez-lobo-97b89a2ab?utm_source=share&amp;utm_campaign=share_via&amp;utm_content=profile&amp;utm_medium=android_app" office:target-frame-name="_top" xlink:show="replace"><text:span text:style-name="T27">LinkedIn</text:span></text:a><text:span text:style-name="T28"><text:s/></text:span></text:p>
                  <text:p text:style-name="P29"><text:a xlink:href="https://drakon04.itch.io/" office:target-frame-name="_top" xlink:show="replace"><text:span text:style-name="T30">Itch.io</text:span></text:a></text:p>
                  <text:p text:style-name="P31"/>
                  <text:p text:style-name="P32">Formación</text:p>
                  <text:p text:style-name="P33"/>
                  <text:p text:style-name="P34">2022</text:p>
                  <text:p text:style-name="P35">Doble Grado de Ingeniería de Computadores y Diseño y Desarrollo de Videojuegos.<text:s/></text:p>
                  <text:p text:style-name="P36"><text:span text:style-name="T37">Universidad Rey Juan Carlos, Móstoles.</text:span><text:line-break/><text:span text:style-name="T38">-Asignaturas destacadas:</text:span><text:span text:style-name="T39"><text:s/>Algoritmos para juegos, Ingeniería de videojuegos y Programación Avanzada.</text:span></text:p>
                  <text:p text:style-name="P40"/>
                  <text:p text:style-name="P41">Idiomas</text:p>
                  <text:p text:style-name="P42">• Español: Nativo<text:line-break/>• Inglés: B2</text:p>
                  <text:p text:style-name="P43">Habilidades Técnicas</text:p>
                  <text:p text:style-name="P44"><text:span text:style-name="T45">Programación:</text:span><text:span text:style-name="T46"><text:line-break/>C#, C++</text:span><text:span text:style-name="T47">,</text:span><text:span text:style-name="T48">Python</text:span><text:span text:style-name="T49"><text:s/>y C.</text:span></text:p>
                  <text:p text:style-name="P50"/>
                </table:table-cell>
              </table:table-row>
            </table:table>
            <text:p text:style-name="P51"/>
          </table:table-cell>
          <table:table-cell table:style-name="TableCell52">
            <text:p text:style-name="P53"/>
            <text:p text:style-name="P54"/>
            <text:p text:style-name="P55"><text:s/>Perfil Profesional</text:p>
            <text:p text:style-name="P56"/>
            <text:p text:style-name="P57">Soy un estudiante de cuarto año del Doble Grado en Videojuegos y Computadores, especializado en programación de videojuegos. Mi principal área de interés es el desarrollo de mecánicas y sistemas core, con experiencia consolidada gracias a varias game jams y proyectos personales. He desarrollado exclusivamente experiencias singleplayer en géneros de acción, plataformas y roguelike. Busco un rol que se ajuste a estos ámbitos. Mis puntos fuertes se basan en un entendimiento lógico del videojuego, lo que me permite identificar fortalezas y debilidades del diseño y resolver errores con mayor claridad. Por otro lado, soy capaz de crear concepts y tener una visión general sobre el juego tanto como en comportamiento lógico como a nivel artístico.</text:p>
            <text:p text:style-name="P58"/>
            <text:p text:style-name="P59"><text:s/>Proyectos Académicos y Personales</text:p>
            <text:p text:style-name="P60"/>
            <text:p text:style-name="P61"><text:span text:style-name="T62">Primer Videojuego–Uncle Belly &amp; The Magic Mushroom</text:span><text:line-break/>Descripción: Primer juego de plataformas que fue un proyecto para una asignatura del grado.</text:p>
            <text:p text:style-name="P63"/>
            <text:p text:style-name="P64"><text:span text:style-name="T65">Último Videojuego –Legado de Sangre</text:span><text:line-break/>Descripción: Último videojuego del género deckbuilder donde has de sobrevivir 5 noches en una mansión atestada de monstruos.</text:p>
            <text:p text:style-name="P66"/>
            <text:p text:style-name="P67"><text:span text:style-name="T68">Herramienta de Unity –Group Values Load System</text:span><text:line-break/>Descripción: Herramienta para<text:s/>Unity<text:s/>que ofrece un sistema de guardado más complejo y completo que Unity por defecto.</text:p>
            <text:p text:style-name="P69"/>
            <text:p text:style-name="P70"><text:span text:style-name="T71">Motores y frameworks:</text:span><text:line-break/>Unity</text:p>
            <text:p text:style-name="P72"><text:span text:style-name="T73">Herramientas:</text:span><text:line-break/>Git, Blender, Krita.</text:p>
            <text:p text:style-name="P74"><text:span text:style-name="T75">Áreas de conocimiento:</text:span><text:line-break/>Gameplay programming, diseño de sistemas, optimización, arquitectura de videojuegos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rián Gómez-Lobo Nuñez</meta:initial-creator>
    <dc:creator>Adrián Gómez-Lobo Nuñez</dc:creator>
    <meta:creation-date>2026-06-23T13:48:00Z</meta:creation-date>
    <dc:date>2026-06-23T13:48:00Z</dc:date>
    <meta:template xlink:href="Normal" xlink:type="simple"/>
    <meta:editing-cycles>2</meta:editing-cycles>
    <meta:editing-duration>PT60S</meta:editing-duration>
    <meta:document-statistic meta:page-count="1" meta:paragraph-count="4" meta:word-count="345" meta:character-count="2240" meta:row-count="15" meta:non-whitespace-character-count="1899"/>
  </office:meta>
</office:document-meta>
</file>